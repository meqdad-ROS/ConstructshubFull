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ubtitle" style:master-page-name="MP0" style:family="paragraph">
      <style:paragraph-properties fo:break-before="page"/>
    </style:style>
    <style:style style:name="P2" style:parent-style-name="Normal" style:family="paragraph">
      <style:paragraph-properties fo:text-align="justify"/>
    </style:style>
    <style:style style:name="T3" style:parent-style-name="DefaultParagraphFont" style:family="text">
      <style:text-properties style:font-name-asian="Aptos" style:font-name-complex="Arial" style:use-window-font-color="true" fo:letter-spacing="normal" fo:font-size="11pt" style:font-size-asian="11pt" style:font-size-complex="11pt"/>
    </style:style>
    <style:style style:name="T4" style:parent-style-name="DefaultParagraphFont" style:family="text">
      <style:text-properties style:font-name-asian="Aptos" style:font-name-complex="Arial" style:use-window-font-color="true" fo:letter-spacing="normal" fo:font-size="11pt" style:font-size-asian="11pt" style:font-size-complex="11pt"/>
    </style:style>
    <style:style style:name="T5" style:parent-style-name="DefaultParagraphFont" style:family="text">
      <style:text-properties style:font-name-asian="Aptos" style:font-name-complex="Arial" style:use-window-font-color="true" fo:letter-spacing="normal" fo:font-size="11pt" style:font-size-asian="11pt" style:font-size-complex="11pt"/>
    </style:style>
    <style:style style:name="T6" style:parent-style-name="DefaultParagraphFont" style:family="text">
      <style:text-properties style:font-name-asian="Aptos" style:font-name-complex="Arial" style:use-window-font-color="true" fo:letter-spacing="normal" fo:font-size="11pt" style:font-size-asian="11pt" style:font-size-complex="11pt"/>
    </style:style>
    <style:style style:name="T7" style:parent-style-name="DefaultParagraphFont" style:family="text">
      <style:text-properties style:font-name-asian="Aptos" style:font-name-complex="Arial" style:use-window-font-color="true" fo:letter-spacing="normal" fo:font-size="11pt" style:font-size-asian="11pt" style:font-size-complex="11pt"/>
    </style:style>
    <style:style style:name="T8" style:parent-style-name="DefaultParagraphFont" style:family="text">
      <style:text-properties style:font-name-asian="Aptos" style:font-name-complex="Arial" style:use-window-font-color="true" fo:letter-spacing="normal" fo:font-size="11pt" style:font-size-asian="11pt" style:font-size-complex="11pt"/>
    </style:style>
    <style:style style:name="T9" style:parent-style-name="DefaultParagraphFont" style:family="text">
      <style:text-properties style:font-name-asian="Aptos" style:font-name-complex="Arial" style:use-window-font-color="true" fo:letter-spacing="normal" fo:font-size="11pt" style:font-size-asian="11pt" style:font-size-complex="11pt"/>
    </style:style>
    <style:style style:name="T10" style:parent-style-name="DefaultParagraphFont" style:family="text">
      <style:text-properties style:font-name-asian="Aptos" style:font-name-complex="Arial" style:use-window-font-color="true" fo:letter-spacing="normal" fo:font-size="11pt" style:font-size-asian="11pt" style:font-size-complex="11pt"/>
    </style:style>
    <style:style style:name="T11" style:parent-style-name="DefaultParagraphFont" style:family="text">
      <style:text-properties style:font-name-asian="Aptos" style:font-name-complex="Arial" style:use-window-font-color="true" fo:letter-spacing="normal" fo:font-size="11pt" style:font-size-asian="11pt" style:font-size-complex="11pt"/>
    </style:style>
    <style:style style:name="T12" style:parent-style-name="DefaultParagraphFont" style:family="text">
      <style:text-properties style:font-name-asian="Aptos" style:font-name-complex="Arial" style:use-window-font-color="true" fo:letter-spacing="normal" fo:font-size="11pt" style:font-size-asian="11pt" style:font-size-complex="11pt"/>
    </style:style>
    <style:style style:name="T13" style:parent-style-name="DefaultParagraphFont" style:family="text">
      <style:text-properties style:font-name-asian="Aptos" style:font-name-complex="Arial" style:use-window-font-color="true" fo:letter-spacing="normal" fo:font-size="11pt" style:font-size-asian="11pt" style:font-size-complex="11pt"/>
    </style:style>
    <style:style style:name="T14" style:parent-style-name="DefaultParagraphFont" style:family="text">
      <style:text-properties style:font-name-asian="Aptos" style:font-name-complex="Arial" style:use-window-font-color="true" fo:letter-spacing="normal" fo:font-size="11pt" style:font-size-asian="11pt" style:font-size-complex="11pt"/>
    </style:style>
    <style:style style:name="T15" style:parent-style-name="DefaultParagraphFont" style:family="text">
      <style:text-properties style:font-name-asian="Aptos" style:font-name-complex="Arial" style:use-window-font-color="true" fo:letter-spacing="normal" fo:font-size="11pt" style:font-size-asian="11pt" style:font-size-complex="11pt"/>
    </style:style>
    <style:style style:name="T16" style:parent-style-name="DefaultParagraphFont" style:family="text">
      <style:text-properties style:font-name-asian="Aptos" style:font-name-complex="Arial" style:use-window-font-color="true" fo:letter-spacing="normal" fo:font-size="11pt" style:font-size-asian="11pt" style:font-size-complex="11pt"/>
    </style:style>
    <style:style style:name="T17" style:parent-style-name="DefaultParagraphFont" style:family="text">
      <style:text-properties style:font-name-asian="Aptos" style:font-name-complex="Arial" style:use-window-font-color="true" fo:letter-spacing="normal" fo:font-size="11pt" style:font-size-asian="11pt" style:font-size-complex="11pt"/>
    </style:style>
    <style:style style:name="T18" style:parent-style-name="DefaultParagraphFont" style:family="text">
      <style:text-properties style:font-name-asian="Aptos" style:font-name-complex="Arial" style:use-window-font-color="true" fo:letter-spacing="normal" fo:font-size="11pt" style:font-size-asian="11pt" style:font-size-complex="11pt"/>
    </style:style>
    <style:style style:name="T19" style:parent-style-name="DefaultParagraphFont" style:family="text">
      <style:text-properties style:font-name-asian="Aptos" style:font-name-complex="Arial" style:use-window-font-color="true" fo:letter-spacing="normal" fo:font-size="11pt" style:font-size-asian="11pt" style:font-size-complex="11pt"/>
    </style:style>
    <style:style style:name="T20" style:parent-style-name="DefaultParagraphFont" style:family="text">
      <style:text-properties style:font-name-asian="Aptos" style:font-name-complex="Arial" style:use-window-font-color="true" fo:letter-spacing="normal" fo:font-size="11pt" style:font-size-asian="11pt" style:font-size-complex="11pt"/>
    </style:style>
    <style:style style:name="T21" style:parent-style-name="DefaultParagraphFont" style:family="text">
      <style:text-properties style:font-name-asian="Aptos" style:font-name-complex="Arial" style:use-window-font-color="true" fo:letter-spacing="normal" fo:font-size="11pt" style:font-size-asian="11pt" style:font-size-complex="11pt"/>
    </style:style>
    <style:style style:name="T22" style:parent-style-name="DefaultParagraphFont" style:family="text">
      <style:text-properties style:font-name-asian="Aptos" style:font-name-complex="Arial" style:use-window-font-color="true" fo:letter-spacing="normal" fo:font-size="11pt" style:font-size-asian="11pt" style:font-size-complex="11pt"/>
    </style:style>
    <style:style style:name="T23" style:parent-style-name="DefaultParagraphFont" style:family="text">
      <style:text-properties style:font-name-asian="Aptos" style:font-name-complex="Arial" style:use-window-font-color="true" fo:letter-spacing="normal" fo:font-size="11pt" style:font-size-asian="11pt" style:font-size-complex="11pt"/>
    </style:style>
    <style:style style:name="T24" style:parent-style-name="DefaultParagraphFont" style:family="text">
      <style:text-properties style:font-name-asian="Aptos" style:font-name-complex="Arial" style:use-window-font-color="true" fo:letter-spacing="normal" fo:font-size="11pt" style:font-size-asian="11pt" style:font-size-complex="11pt"/>
    </style:style>
    <style:style style:name="T25" style:parent-style-name="DefaultParagraphFont" style:family="text">
      <style:text-properties style:font-name-asian="Aptos" style:font-name-complex="Arial" style:use-window-font-color="true" fo:letter-spacing="normal" fo:font-size="11pt" style:font-size-asian="11pt" style:font-size-complex="11pt"/>
    </style:style>
    <style:style style:name="T26" style:parent-style-name="DefaultParagraphFont" style:family="text">
      <style:text-properties style:font-name-asian="Aptos" style:font-name-complex="Arial" style:use-window-font-color="true" fo:letter-spacing="normal" fo:font-size="11pt" style:font-size-asian="11pt" style:font-size-complex="11pt"/>
    </style:style>
    <style:style style:name="P27" style:parent-style-name="ListParagraph" style:list-style-name="LFO2" style:family="paragraph">
      <style:text-properties fo:background-color="#FFFF00"/>
    </style:style>
    <style:style style:name="P28" style:parent-style-name="ListParagraph" style:list-style-name="LFO2" style:family="paragraph">
      <style:text-properties fo:background-color="#FFFF00"/>
    </style:style>
    <style:style style:name="P29" style:parent-style-name="ListParagraph" style:list-style-name="LFO2" style:family="paragraph"/>
    <style:style style:name="T30" style:parent-style-name="DefaultParagraphFont" style:family="text">
      <style:text-properties fo:background-color="#FFFF00"/>
    </style:style>
    <style:style style:name="P31" style:parent-style-name="ListParagraph" style:list-style-name="LFO2" style:family="paragraph"/>
    <style:style style:name="P32" style:parent-style-name="ListParagraph" style:list-style-name="LFO2" style:family="paragraph"/>
    <style:style style:name="P33" style:parent-style-name="ListParagraph" style:list-style-name="LFO2" style:family="paragraph"/>
    <style:style style:name="P34" style:parent-style-name="ListParagraph" style:list-style-name="LFO2" style:family="paragraph"/>
    <style:style style:name="P35" style:parent-style-name="ListParagraph" style:family="paragraph">
      <style:paragraph-properties fo:margin-left="1in">
        <style:tab-stops/>
      </style:paragraph-properties>
    </style:style>
    <style:style style:name="T36"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37"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38"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39"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0"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1"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2"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3"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4"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5"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6"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0"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1"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2"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3"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4"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5"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6"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7"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8"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59"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60"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61"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62" style:parent-style-name="DefaultParagraphFont" style:family="text">
      <style:text-properties style:font-name-asian="Times New Roman" style:font-name-complex="Times New Roman" fo:color="#595959" fo:letter-spacing="0.0104in" fo:font-size="14pt" style:font-size-asian="14pt" style:font-size-complex="14pt"/>
    </style:style>
    <style:style style:name="T63" style:parent-style-name="DefaultParagraphFont" style:family="text">
      <style:text-properties style:font-name-asian="Times New Roman" style:font-name-complex="Times New Roman" fo:color="#595959" fo:letter-spacing="0.0104in" fo:font-size="14pt" style:font-size-asian="14pt" style:font-size-complex="14pt"/>
    </style:style>
  </office:automatic-styles>
  <office:body>
    <office:text text:use-soft-page-breaks="true">
      <text:p text:style-name="P1">USE Scenario customer Experience 1- casual user.</text:p>
      <text:p text:style-name="P2">Keep in mind that I am building a web-based merchendice store and its companion mobile app to work on ios, android, harmony ... etc. The store is specilised in construction, construction material and, and construction echo system: a normal small user who has a deficiency in his house for example a leakage in his bath room sink, or who need to paint his house walls. He go to my webstore (Constructs hub, or BanaBuild), look for heis need through search bar using key words for eaxample in our case ( wash sink, italian sink, grouhi sink, or paint, indorr wall paint, oily indoor paint beige color.. etc) and hit enter bottom or search icon on the site. The site then return all related and relevent result from database and web backend, the web desplay thier pictures in matrix grids, under each search resulted picture thier is a preif discribtion, price, name of the bayer (vendor or store), review score for the object, bay now option, and add to abscket icon and two more icons location of the store and onther one says "do you need delevery or pick from the store" and " do you need a specific technichine to fix it?" "and its available now or in for example 5 days" and "get qutation bottom if the price not available the user who already regestered in the site and he has his own account he already also registered his address and appointed his leaving or his work location using mouse and drop-bin feater from google maps" he could then arrange or filter search result by "price, most relevent, nearest store, most populer, highest review score, availability of technichen to fix and maintain, deleveray time, and availability time) then based on his preferences he add the one he selected to the basket, then he chose to be delevered to his location. then he press I need technichien to fix it. Now he can see now on the screen there is a notification says there is an item in the shopping basket, while the page continue to the technechine page showing personel and people who has registered in the site as for example (painter, or plumber, or mechanical technichen expert". The page show all people and under each guy of them statistics, "number of completed job", "hourly rate for job/ or job cost / or get quotation buttom", clients satisfaction of his work (review score), "availability", "location", "time to reach the client distination", ... etc and "hier now bottom". By default this page arrange workers and technichen in thier nearest location, and if they registerd as a worker in the same store where the user chose to buy his material", However, the user can arrange the grid search based on cost, hourly rate, availability, location, review score, ... etc. once the user hit the get "qoutation" a notification directly sent the worker mailbox on the site, and webpage, with auto generated letter (by default" discribes the purchaced material and the job to be done in the work for example "fitting and assimpling the water sink" or for example "painting an indoor wall with the (specification of the purchaced paint") under the letter, there should be a buttom say "contact the client for more details about the job". Once the worker hit this link he can then start a chate and emailing (or correspondance activity) with the client. The worker then can create his working plan, working schedual and cost scope for each phase of his work. in the user side, the user recieved the worker time schedual, cost and phases of the work then he can agree, negotiate or simply disagree, if he agrees the worker, then a notification sent to the worker side that he already has been hired. in any time through this process the user can go to complete checkout his basket to complete purchasing his object. He can click on check out link beside the basket icon, then he can go to the check out page. In this page he can decide to continue, remove the object/s or increase their number/s. then he can check continue to go for payment page. in the payment page, the user can choose between "pay in the site directly to the merchent, or pay by crdit card" other payment options should be available in a later stage. If he choose to pick his object from the store and to pay in the site. than that its. the purchase is complete from the user side. Then the user will directly directed to review product and review store page "as AI agent you should generate the detail discribtion of the shape of this page". At the store dashboard (mercient dashboard) the mecient has the ability then to evaluate the user purchace process and honesty<text:s/><text:soft-page-break/>and his experience with him, "as AI agent you should generate the detail discribtion of the shape of this page". if the user chose to pick from the store and to pay by crdit card, he will directled then to the crdit card detailes to be entered. once it entered and he pressed continue (he has the ability to save the card for later purchase process) he directed to the back payment confirmation letter and page. Once it done then he directed to the same review page described in above page. The store recieve notification of the purchaced Item then the store prepare the item and wait, once the user picked his object the store directed to user review page as described above. the change in pay use crdit card and tracking process. if the user choose to pay by credit card or in site, but he choose a delever to site option from the materail page, then if the object is small, and easy to carry the page directly direct the user to google map to see where his object became, in similar way to the driver tracking process used in apps such as kareem and ubber drive and carry on apps. If the object is true heavy let us say (a bulks "2 to 3 ton" of cement) or (4-5 ton of steel rebars), the store then should be discribed clearly in the materail page of the store dashbaord the specification minimum and maximum of the required vehicle and their should be a facility in the size to calculate among them the minimum specification of the required vehicle specification of the material quantitiy, for example if the user asked for letus say one or two jar of the paints it will be easy to delever it using motor bick or a small car, but its not the case if he asked for almost 5-6 tons of painting material. the same can be said if the user asekd for 30 ton of steel rebars instead of 2 tons, or for 3 tons of cement instead of 40 tons or instead of only one chunck. The website then show the user to choose the available dilivary mean (truck, car or bike, thier location, dilivary time and cost) the user can filter them in a similar way that he made in workers and materials. then he can choose. once he choosed, he directed to the payment page and next pages as discribed above including the tracking page as mentioned above. However, In the last case, the user also has the ability to review the driver of the vehicle and delevery process in the page of review beside reviewing the store and the material. The vehicle driver also ahs the ability to review the user in his dashbaord after he recieve job has completed from the user or system if the time passed over than 5 times the designated dilivery time. If the user choose a worker or a technichen and agrees him, a process of closing and revieweing the job done and follow it up similar to the one in upwork platform then should be followed finally, the payed ammount of the purchaced material should transfere to the store banck account. the payed ammount for the job done should be transfered to the worker banck account. the delevary cost that already paied then should be transfered to the vehicle owner or driver bacnk account. those ammounts can be calculated at once and payed at once from the user payment page side, but seperated and transfered seperatly to each of the three web client and users (store (mercient, worker, vehicle). Those ammount should be registered in each of the above 4 type of web page user dashbaord, each in his dash baord history so he can returen to the money transaction process and to the process it self. the transaction should be appear on the analysis screen at each user (AI agent should decide on this screen for now).</text:p>
      <text:p text:style-name="Normal"/>
      <text:p text:style-name="Subtitle">USE Scenario customer Experience 2 Casual user</text:p>
      <text:p text:style-name="Normal"/>
      <text:p text:style-name="Subtitle">USE Scenario customer Experience 3 Owner and governmental organization:<text:s/><text:line-break/>This user can be a small owner (casual user) or a represntator of<text:s/><text:span text:style-name="T3">building department of a huge realstate or any company needs to build a building what ever, the building was. In this case, there is two different scenarios, <text:s/>the first scenario if this user have the<text:s/></text:span><text:soft-page-break/><text:span text:style-name="T4">idea of develop the building plans from scratch. In this case, he has the idea but has no idea how to do it. Thus he log-in to the site, fill his requirement, for example (I want to build a house for my five child family, or I want to build an office to be my company headquarter). In this case the system should has the facility to start a chat like this (Can I help you by providing me with extra details? What is the space of the building? How many floors? How many rooms? Where? When? …. Etc? Do you want me to create a pidding for you? Do you want me to recommend you the best consultants who can help you plan your own building? Chat should make answers concise and direct to one of tow at max. After a full detailes is chosen the system then direct the user to the search result of a consultants near to him in his area or neer to his requirements if the required specification are not within his range. Or it will distribute the bidding and made it among all consultants registered in the site) once the bidding distributed the consultant then can read the details, and apply for auction. Owner can monitor and follow all offeres, he can interview the offeree, contact with them. Once he assigns one of them he can then follow the implementation schedule of the project through the stie and handle payment and deliverable through it.</text:span><text:span text:style-name="T5"><text:line-break/>once the building design finished, he as an owner or the consultant as a designer then needs to estimate the cost of the building (money, finansial scope) and the (time scope) of the construction. Then he can upload the ICF (.ICF), or CAD drawing (.DWG) alnongside the specifications and BOQ documents (as .PDF, or .Docx or .xlsx). Here we have two scenarios. The ICF scenario and the DWG and documents scenario.<text:s/></text:span><text:span text:style-name="T6"><text:line-break/>in the first scenario, the site then has API which is able to decompose the IC Ffile generate the specifications, and bill of quantities and generate a full table of each compnenents and materials of the building (construction ) and needed labore to excute it. Once its generated, the site present this table and present 3 choices, (cheapest, highest and moderate cost estimation) once the user choose one of these 3 choices, the software then (the site start search for the suitable specification for each component until generate a full list of them with price and time estimate and suitable labore for it. And it will show the three cost estimate with the highlight of the previously<text:s/></text:span><text:span text:style-name="T7">choose</text:span><text:span text:style-name="T8"><text:s/>estimate. At each component, the user can select it explorer different<text:s/></text:span><text:span text:style-name="T9">options</text:span><text:span text:style-name="T10"><text:s/>(suppliers) on the site, select most suitable one of them and even contact them to get<text:s/></text:span><text:span text:style-name="T11">offers</text:span><text:span text:style-name="T12">. Under each component he then can<text:s/></text:span><text:span text:style-name="T13">choose</text:span><text:span text:style-name="T14">, delivery method, and the choose according to the location, cost, time of availability … etc.)<text:s/></text:span><text:span text:style-name="T15"><text:line-break/>Once the cost estimate has finished, the owner then or his<text:s/></text:span><text:span text:style-name="T16">presenter</text:span><text:span text:style-name="T17"><text:s/>or his consultant can choose whither to keep his work for later stage, or take control of it and he can build it by hiring a suitable subcontractor for each specific part of the construction and specific component or materials. Or he can distribute or announce for new bidding and to attract full contractor to tack control of the building <text:s/>(construction) process. He than can receive<text:s/></text:span><text:span text:style-name="T18">offers</text:span><text:span text:style-name="T19"><text:s/>contact, negotiate and evaluate offerees, and hire the most suitable one of them. Then he can follow construction process through the site. And manage execution, and handle disiputes and payment.<text:s/></text:span><text:span text:style-name="T20"><text:line-break/>Once the contractor is assigned he (the contractor) can work as a normal user of searching material, assign suppliers, use<text:s/></text:span><text:span text:style-name="T21">labour</text:span><text:span text:style-name="T22"><text:s/>and<text:s/></text:span><text:span text:style-name="T23">technician</text:span><text:span text:style-name="T24"><text:s/>service, assign delivery means and schedule and rent heavy<text:s/></text:span><text:span text:style-name="T25">machinery</text:span><text:span text:style-name="T26"><text:s/></text:span></text:p>
      <text:p text:style-name="Normal"/>
      <text:p text:style-name="Normal">6 different types of users:</text:p>
      <text:list text:style-name="LFO2" text:continue-numbering="true">
        <text:list-item>
          <text:p text:style-name="P27">Casual (Normal User) (house hold)</text:p>
        </text:list-item>
        <text:list-item>
          <text:p text:style-name="P28">Governmental (Huge) institute<text:s/></text:p>
        </text:list-item>
        <text:list-item>
          <text:p text:style-name="P29"><text:span text:style-name="T30">Consultant</text:span><text:s/></text:p>
        </text:list-item>
        <text:list-item>
          <text:p text:style-name="P31">Contractor</text:p>
        </text:list-item>
        <text:list-item>
          <text:p text:style-name="P32">Technician and labour (and professionals)</text:p>
        </text:list-item>
        <text:list-item>
          <text:p text:style-name="P33">Heavy machinery driver<text:s/></text:p>
        </text:list-item>
        <text:list-item>
          <text:p text:style-name="P34">Material Supplyiers</text:p>
        </text:list-item>
      </text:list>
      <text:p text:style-name="P35"/>
      <text:p text:style-name="Normal"><text:span text:style-name="T36">USE Scenario customer Experience<text:s/></text:span><text:span text:style-name="T37">4</text:span><text:span text:style-name="T38"><text:s/></text:span><text:span text:style-name="T39">Consultant</text:span><text:span text:style-name="T40">:<text:s/></text:span><text:span text:style-name="T41"><text:line-break/></text:span>This user is a construction consulting firm or Architecher and Engineering firm that deal with both construction design, detail design and construction execution supervision. The main use for the site of this type of users is to find the most suitable supplier in his area, most suitable contractor for his project and to find the latest available solutions for his design problem in the market. So he deals with tendering too as a consultant and representator for the construction owner.<text:s/></text:p>
      <text:p text:style-name="Normal">The consulting needs to find the best solutions for his problem during different design phases and in some cases during design phase<text:s/>he need to consult suppliers to find the most suitable material or machinery for his<text:s/><text:s/>design issue. Thus, in any time he can enter to the website (Constructshub, or BanaBuild) write a main search topic for his problem. Using NLP and AI tools, the website search tools can return the best solution with the nearest and most suitable supplier for his issue. It then do three things. The first, answering his question in a mater like this, “regarding your design issue there is a solution named … etc, it located in the following suppliers, (the suppliers are presented in the reight tap of the screen or at the bottom)” and it give him the detailed technical answer. The second, the site search engine return all available suppliers, contractor, vendors, manufacturers who deal with this issue registered in the site database, with availability for arranging them by location, price, suitability, best fit, …etc” and ability to hit “get quotation” bottom for each of them. Third, the site search engine spread (publish a notification to those suppliers, vendors, manufacturers and contractors with a polished version of the search problem telling them that this specific consultant is looking for this specific solution” In his dashboard, the consultat can toggle the last one ON/OFF based on his preferences.<text:s/><text:line-break/>During the design phases, consultant can upload and follow up with the construction owner to tell him about the progress in his design stages.<text:s/><text:line-break/>Moreover, once the consultat was only archtict, he can look and search for similar Engineering firm who can support his design as a sub consultant for specific descpline fro example (land scap, swimming poles, electric work…. Etc) based on the consultant discipline area.<text:s/></text:p>
      <text:p text:style-name="Normal">After, all design are finished and the design is approved by the owner, the consultant, need to estimate the cost of the building based on the current world price and expected inclination in at least next one year. He then, upload the design IFC files to the system and hit search<text:s/>button.<text:line-break/>the search engine then, API, decompose the IFC file to its basic components, and <text:s/>generate a full list of bill of quintinites with each single component of the building (construction) and its quantity and display it an a right or lift tap.<text:s/><text:s/>It returns then the suitable suppliers for each component all arranged in categories based on the disciplines. The consultant then can reach each one of them asking<text:s/>and negotiation for the price. It also present the handworker and contractor for each material, thus the consultant can collect their price in the same way. By the way, the site generate a full cost estimation for the entire project breaked and classified according to material and disciplines. Thus consultant can generate a pricing estimation (cost estimation) for his project before publishing its tender. The site, also publish early notification regarding the project tender to all suppliers and contractors in the close area of the project (for example, if the project in Riyadh, the notification published for all those who reside and work in Saudi Arabia, if the project within their budget,<text:s/>or for suitable contractor if the project is aimed to be built by global contractors such American, European or Chinese.<text:s/><text:line-break/><text:soft-page-break/>Once the project price is estimated the consultant can save it to his dashboard for further processing or he can immediately publish it as a full tender. The tender documents can be generated automatically by AI and distributed then. However, the consultant can read, review the entire tender documents and modify them if needed then publish them.<text:s/></text:p>
      <text:p text:style-name="Normal">The Consultant can upload DWG layout, with pdf or docx or xlsx<text:s/>project specification and bill of quantities, and the site then and its API will do the same thing made with IFC above in the same process way.<text:s/><text:line-break/><text:line-break/>After uploading the tender the consultant and the construction owner can receive biddings and evaluate them based on qualification, price suitability and time of completion. <text:s/>Then through constructshub site he can assign the contractor and follow up the construction process as a project manger or owner presentator if the owner assigned him to do so.<text:s/><text:line-break/><text:line-break/>However, consultat has another side before hand, he can hunt and find out about any construction intent and apply bid for it once it published through constructshub website.<text:s/><text:line-break/><text:line-break/><text:span text:style-name="T42">USE Scenario customer Experience<text:s/></text:span><text:span text:style-name="T43">5</text:span><text:span text:style-name="T44"><text:s/></text:span><text:span text:style-name="T45">Contractor</text:span><text:span text:style-name="T46">:</text:span><text:line-break/>As consultant above contractors all the time hunting for new project tender and new opportunity. Once the owner and/or the consultant uploaded a project for search they notified for the project, then they start contact the project publisher for more details tp prepare their documents for bidding. Once the project is open for<text:s/>bidding and the tender is offered, they can directly apply through the website by only pushing apply bottom. At<text:s/>constructshub all contractors are registered with their financial<text:s/>capabilities<text:s/>and<text:s/>technical capabilities, they have a full profile uploaded in the Constructs hub dashboards and thus database. The API and search engine can access them and read them completely.<text:s/><text:span text:style-name="T47"><text:line-break/></text:span><text:span text:style-name="T48"><text:line-break/>continue here ….</text:span><text:line-break/></text:p>
      <text:p text:style-name="Normal"><text:span text:style-name="T49">USE Scenario customer Experience<text:s/></text:span><text:span text:style-name="T50">6</text:span><text:span text:style-name="T51"><text:s/></text:span><text:span text:style-name="T52">Material Suppliers</text:span><text:span text:style-name="T53">:</text:span><text:line-break/>constructshub website<text:line-break/></text:p>
      <text:p text:style-name="Normal"/>
      <text:p text:style-name="Normal"><text:span text:style-name="T54">USE Scenario customer Experience<text:s/></text:span><text:span text:style-name="T55">7</text:span><text:span text:style-name="T56"><text:s/></text:span><text:span text:style-name="T57">Technical and Labour (professional)</text:span><text:span text:style-name="T58">:</text:span><text:line-break/>constructshub website</text:p>
      <text:p text:style-name="Normal"/>
      <text:p text:style-name="Normal"/>
      <text:p text:style-name="Normal"><text:span text:style-name="T59">USE Scenario customer Experience<text:s/></text:span><text:span text:style-name="T60">8</text:span><text:span text:style-name="T61"><text:s/></text:span><text:span text:style-name="T62">Heavy machinery and equipment rental and drivers</text:span><text:span text:style-name="T63">:</text:span><text:line-break/>constructshub websit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EQDAD HASAN</meta:initial-creator>
    <dc:creator>MEQDAD HASAN</dc:creator>
    <meta:creation-date>2026-04-30T06:09:00Z</meta:creation-date>
    <dc:date>2026-05-12T08:11:00Z</dc:date>
    <meta:template xlink:href="Normal.dotm" xlink:type="simple"/>
    <meta:editing-cycles>12</meta:editing-cycles>
    <meta:editing-duration>PT176940S</meta:editing-duration>
    <meta:document-statistic meta:page-count="5" meta:paragraph-count="36" meta:word-count="2759" meta:character-count="18452" meta:row-count="131" meta:non-whitespace-character-count="15729"/>
  </office:meta>
</office:document-meta>
</file>